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Subtitle">
      <style:text-properties fo:language="en" fo:country="US"/>
    </style:style>
    <style:style style:name="P2" style:family="paragraph" style:parent-style-name="Содержимое_20_таблицы_20_по_20_центру">
      <style:text-properties officeooo:rsid="00318473" officeooo:paragraph-rsid="00318473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Contents_20_Heading" style:master-page-name="First_20_Page">
      <style:paragraph-properties style:page-number="1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318473" officeooo:paragraph-rsid="00318473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6pt" fo:font-weight="bold" officeooo:rsid="00318473" officeooo:paragraph-rsid="00318473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ФАКУЛЬТЕТ</text:p>
          </table:table-cell>
          <table:table-cell table:style-name="Таблица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Table_20_Contents">КАФЕДРА</text:p>
          </table:table-cell>
          <table:table-cell table:style-name="Таблица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itle">ОТЧЕТ<text:line-break/>о лабораторной работе №14</text:p>
      <text:p text:style-name="Standard"/>
      <text:p text:style-name="P1"><text:span text:style-name="T1">Тема лабораторной работы: ООП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>Выполнил</text:p>
          </table:table-cell>
          <table:table-cell table:style-name="Таблица3.B1" office:value-type="string">
            <text:p text:style-name="Table_20_Contents">студент группы ИУ10-4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  <table:table-row>
          <table:table-cell table:style-name="Таблица3.A1" office:value-type="string">
            <text:p text:style-name="Table_20_Contents">Проверил</text:p>
          </table:table-cell>
          <table:table-cell table:style-name="Таблица3.B1" office:value-type="string">
            <text:p text:style-name="Table_20_Contents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</table:table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Contents_20_1"><text:a xlink:type="simple" xlink:href="#__RefHeading___Toc1116_1594055144" text:style-name="Index_20_Link" text:visited-style-name="Index_20_Link">Постановка задачи<text:tab/>2</text:a></text:p>
          <text:p text:style-name="Contents_20_1"><text:a xlink:type="simple" xlink:href="#__RefHeading___Toc1118_1594055144" text:style-name="Index_20_Link" text:visited-style-name="Index_20_Link">Теоретическая часть<text:tab/></text:a>2</text:p>
          <text:p text:style-name="Contents_20_1"><text:a xlink:type="simple" xlink:href="#__RefHeading___Toc1126_1594055144" text:style-name="Index_20_Link" text:visited-style-name="Index_20_Link">Листинг программы<text:tab/>3</text:a></text:p>
          <text:p text:style-name="Contents_20_1"><text:a xlink:type="simple" xlink:href="#__RefHeading___Toc1128_1594055144" text:style-name="Index_20_Link" text:visited-style-name="Index_20_Link">Результат работы программы<text:tab/></text:a>3</text:p>
          <text:p text:style-name="Contents_20_1"><text:a xlink:type="simple" xlink:href="#__RefHeading___Toc1130_1594055144" text:style-name="Index_20_Link" text:visited-style-name="Index_20_Link">Список использованной литературы и материалов<text:tab/></text:a>4</text:p>
        </text:index-body>
      </text:table-of-content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остановка задачи</text:p>
      <text:p text:style-name="P5"/>
      <text:p text:style-name="P5">Переписать программный код лабораторных работ №7 и №8 с использованием классов языка Python. Исходная функциональность программ должна быть полностью сохранена, изменению подлежит только структура кода — переход от процедурного стиля к объектно-ориентированному.</text:p>
      <text:p text:style-name="P5"/>
      <text:p text:style-name="P5"><text:span text:style-name="Strong_20_Emphasis">Рефакторинг программы построения графиков функций (первый код).</text:span> Исходная программа предназначалась для построения графика кусочно-заданной функции с использованием библиотеки Turtle. В ходе рефакторинга был создан класс FunctionPlotter, который инкапсулирует всю логику построения графика. В конструктор класса передаются параметры функции: начальное значение X, конечное значение X, шаг и масштаб отображения. Приватный метод _setup_turtle настраивает окно и черепашку. Метод calculate_y вычисляет значение кусочно-заданной функции. Метод draw_axes рисует оси координат с делениями и подписями. Метод draw_graph строит график функции, проходя по всем значениям X. Метод add_title добавляет заголовок к графику. Основной метод plot объединяет все этапы построения и запускает отображение. Также была создана функция main, которая отвечает за взаимодействие с пользователем и создание экземпляра класса.</text:p>
      <text:p text:style-name="Text_20_body">В результате рефакторинга код стал более структурированным, появилась возможность легко создавать несколько графиков с разными параметрами, упростилось тестирование отдельных компонентов.</text:p>
      <text:p text:style-name="Text_20_body"><text:span text:style-name="Strong_20_Emphasis">Рефакторинг программы метода Монте-Карло (второй код).</text:span> Исходная программа вычисляла площадь фигуры методом Монте-Карло с визуализацией точек с помощью Turtle. В ходе рефакторинга были созданы четыре класса.</text:p>
      <text:p text:style-name="Text_20_body">Класс ShapeAnalyzer отвечает за аналитическое вычисление площади фигуры и содержит методы calculate_areas для вычисления площадей составных частей и display_analytical_result для вывода результатов. Класс MonteCarloSimulator проводит симуляцию методом Монте-Карло. Он включает метод is_point_inside для проверки попадания точки в фигуру, метод run_simulation для запуска генерации случайных <text:soft-page-break/>точек и сбора статистики, метод get_results для получения результатов и метод display_results для вывода результатов. Класс MonteCarloVisualizer выполняет визуализацию результатов. Он содержит методы draw_axes для рисования осей, draw_points для отображения синих точек внутри фигуры и красных точек снаружи, draw_square_boundary для рисования границы квадрата, add_titles для добавления заголовков, а также метод visualize, объединяющий все этапы отображения. Класс MonteCarloApp является главным и объединяет все компоненты, управляя последовательностью выполнения программы.</text:p>
      <text:p text:style-name="Text_20_body">В результате достигнуто четкое разделение ответственности между классами, появилась возможность независимого использования каждого компонента, упрощено добавление новых методов визуализации или вычислений.</text:p>
      <text:p text:style-name="Text_20_body"><text:span text:style-name="Strong_20_Emphasis">Рефакторинг программы с графическим интерфейсом на Tkinter (третий код).</text:span> Исходная программа представляла собой приложение с графическим интерфейсом для построения графиков функций с использованием ряда Тейлора и экспоненциальной функции, с библиотеками Tkinter и matplotlib. В ходе рефакторинга было создано семь классов.</text:p>
      <text:p text:style-name="Text_20_body">Класс TaylorSeries содержит статические методы calculate_term для вычисления n-го члена ряда Тейлора и compute_y для вычисления суммы ряда с заданной точностью. Класс FunctionCalculator объединяет методы вычисления функций: y_function использует ряд Тейлора, z_function вычисляет экспоненциальную функцию с параметром b, а метод generate_data создает массивы значений для построения графиков. Класс Plotter отвечает за построение и обновление графиков в matplotlib. Его метод _setup_plot настраивает область для графиков, а метод update_plots очищает предыдущие графики и строит новые с актуальными данными. Класс InputValidator содержит статические методы для валидации входных данных: validate_range проверяет корректность диапазона X, validate_positive проверяет положительность шага и точности, а метод validate_all выполняет комплексную проверку всех параметров.</text:p>
      <text:p text:style-name="Text_20_body">Класс InputFrame создает и управляет панелью ввода. Он включает методы _create_widgets для создания полей ввода и кнопок, _get_values_from_entries для <text:soft-page-break/>считывания и валидации данных, _on_update для обработки нажатия кнопки построения, _on_exit для выхода из приложения и get_parameters для получения всех параметров. Класс InfoPanel отображает информационную панель с описанием математических функций. Класс Lab8App является главным классом приложения, который настраивает размер окна, создает интерфейс, объединяет все компоненты и управляет обновлением графиков.</text:p>
      <text:p text:style-name="Text_20_body">В результате соблюден принцип единой ответственности для всех классов, код стал более тестируемым, упрощено добавление новых типов функций и графиков, а также облегчена поддержка и модификация кода.</text:p>
      <text:p text:style-name="Text_20_body"/>
      <text:p text:style-name="P6">Листинг программы</text:p>
      <text:p text:style-name="P6"/>
      <text:p text:style-name="P7">https://github.com/warofconnection/BMSTU_Python_UstinovIM</text:p>
      <text:p text:style-name="P5"/>
      <text:p text:style-name="P5"/>
      <text:p text:style-name="P5"/>
      <text:p text:style-name="P5">Список использованной литературы и материалов</text:p>
      <text:p text:style-name="P5"/>
      <text:p text:style-name="P5">1. Иванова Г.С. Основы программирования: учебник для вузов. – 4-е изд., стер. – М: изд-во МГТУ им. Н.Э. Баумана, 2007. – 416 с.: ил.</text:p>
      <text:p text:style-name="P5">2. Лутц М. Изучаем Python. – 5-е изд. – М.: Диалектика, 2019. – 1460 с.: ил.</text:p>
      <text:p text:style-name="P5">3. Брюс М. Ван Хорн II, Куан Нгуен. PyCharm: профессиональная работа на Python / пер. с англ. И.Л. Люско. – М.: ДМК Пресс, 2024. – 618 с.: ил.</text:p>
      <text:p text:style-name="P5">4. Welcome to python.org. — Текст : электронный // The official home of the Python Programming Language : [сайт]. — URL: https://www.python.org/</text:p>
      <text:p text:style-name="P5">5. Git. — Текст : электронный // Git : [сайт]. — URL: https://git-scm.com/</text:p>
      <text:p text:style-name="P5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210d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27M45S</meta:editing-duration>
    <meta:editing-cycles>11</meta:editing-cycles>
    <meta:generator>LibreOffice/25.8.6.2$Windows_X86_64 LibreOffice_project/b4b39682cd9868fa725bc664aff94278d315bd04</meta:generator>
    <dc:title>my_default</dc:title>
    <dc:date>2026-06-06T01:30:48.830526500</dc:date>
    <meta:document-statistic meta:table-count="3" meta:image-count="1" meta:object-count="0" meta:page-count="6" meta:paragraph-count="47" meta:word-count="758" meta:character-count="6167" meta:non-whitespace-character-count="5440"/>
  </office:meta>
</office:document-meta>
</file>