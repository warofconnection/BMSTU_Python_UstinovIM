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en" fo:country="US" officeooo:rsid="0015098b" officeooo:paragraph-rsid="002c06b5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33b6fb" officeooo:paragraph-rsid="0033b6fb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31d59c" officeooo:paragraph-rsid="0031d59c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center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7" style:family="paragraph" style:parent-style-name="Text_20_body">
      <style:paragraph-properties fo:text-align="start" style:justify-single-word="false"/>
      <style:text-properties fo:language="ru" fo:country="RU" officeooo:rsid="0023e910" officeooo:paragraph-rsid="0031d59c"/>
    </style:style>
    <style:style style:name="P18" style:family="paragraph" style:parent-style-name="Standard">
      <style:paragraph-properties fo:text-align="center" style:justify-single-word="false"/>
      <style:text-properties fo:font-weight="bold" officeooo:paragraph-rsid="0031d59c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ru" fo:country="RU" fo:font-weight="bold" officeooo:paragraph-rsid="0031d59c" style:font-weight-asian="bold" style:font-weight-complex="bold"/>
    </style:style>
    <style:style style:name="P20" style:family="paragraph" style:parent-style-name="Standard">
      <style:paragraph-properties fo:line-height="150%"/>
      <style:text-properties officeooo:paragraph-rsid="0031d59c"/>
    </style:style>
    <style:style style:name="P21" style:family="paragraph" style:parent-style-name="Standard">
      <style:paragraph-properties fo:line-height="150%" fo:text-align="start" style:justify-single-word="false"/>
      <style:text-properties fo:language="ru" fo:country="RU" officeooo:rsid="0023e910" officeooo:paragraph-rsid="0031d59c"/>
    </style:style>
    <style:style style:name="T1" style:family="text">
      <style:text-properties officeooo:rsid="002cb101"/>
    </style:style>
    <style:style style:name="T2" style:family="text">
      <style:text-properties officeooo:rsid="0031d59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31d59c"/>
    </style:style>
    <style:style style:name="T5" style:family="text">
      <style:text-properties officeooo:rsid="002eb696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officeooo:rsid="0028f36d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<text:span text:style-name="T1">1</text:span><text:span text:style-name="T2">5</text:span></text:p>
      <text:p text:style-name="Standard"/>
      <text:p text:style-name="P4"><text:span text:style-name="T3">Тема лабораторной работы: </text:span><text:span text:style-name="T4">Работа с памятью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</text:index-title>
          <text:p text:style-name="P10"><text:a xlink:type="simple" xlink:href="#__RefHeading___Toc1116_1594055144" text:style-name="Index_20_Link" text:visited-style-name="Index_20_Link">Постановка задачи<text:tab/>2</text:a></text:p>
          <text:p text:style-name="P10"><text:a xlink:type="simple" xlink:href="#__RefHeading___Toc1118_1594055144" text:style-name="Index_20_Link" text:visited-style-name="Index_20_Link">Теоретическая часть<text:tab/></text:a><text:span text:style-name="T1">2</text:span></text:p>
          <text:p text:style-name="P11">Ход выполнения работы<text:tab/>3</text:p>
          <text:p text:style-name="P10"><text:a xlink:type="simple" xlink:href="#__RefHeading___Toc1126_1594055144" text:style-name="Index_20_Link" text:visited-style-name="Index_20_Link">Листинг программы<text:tab/></text:a><text:span text:style-name="T2">4</text:span></text:p>
          <text:p text:style-name="P10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5">4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soft-page-break/>Постановка задачи</text:p>
      <text:p text:style-name="P16">1. Изучить механизмы работы с памятью в Python на примере стандартного списка (list).</text:p>
      <text:p text:style-name="P16">2. Реализовать собственный динамический массив (аналог списка) с использованием модуля ctypes для работы с низкоуровневой памятью.</text:p>
      <text:p text:style-name="P16">3. Исследовать поведение выделения памяти при добавлении и удалении элементов.</text:p>
      <text:p text:style-name="P16"/>
      <text:p text:style-name="P15">Теоретическая часть</text:p>
      <text:p text:style-name="P16"/>
      <text:p text:style-name="P16">Управление памятью в Python</text:p>
      <text:p text:style-name="P16">Python автоматически управляет памятью с помощью механизма подсчета ссылок и сборщика мусора. Каждый объект в Python хранится в куче (heap), а переменные содержат ссылки на эти объекты.</text:p>
      <text:p text:style-name="P16">Функция id() возвращает уникальный идентификатор объекта, который в CPython представляет собой адрес объекта в памяти. Функция hex() позволяет представить этот адрес в шестнадцатеричной системе счисления.</text:p>
      <text:p text:style-name="P16"/>
      <text:p text:style-name="P16">Модуль ctypes</text:p>
      <text:p text:style-name="P16">Модуль ctypes предоставляет возможность работать с C-типами данных и низкоуровневой памятью напрямую. Функция ctypes.cast() позволяет преобразовать адрес памяти в объект Python. Тип ctypes.py_object используется для хранения ссылок на объекты Python в массиве.</text:p>
      <text:p text:style-name="P16"/>
      <text:p text:style-name="P16">Динамический массив</text:p>
      <text:p text:style-name="P16"/>
      <text:p text:style-name="P16">Динамический массив — это структура данных, которая автоматически изменяет свой размер при добавлении или удалении элементов. Основные принципы:</text:p>
      <text:p text:style-name="P16">- При создании массива выделяется начальная емкость (capacity)</text:p>
      <text:p text:style-name="P17">- Фактическое количество элементов хранится в переменной length</text:p>
      <text:p text:style-name="P17"><text:soft-page-break/>- При добавлении элемента, если length == capacity, массив расширяется (обычно в 2 раза)</text:p>
      <text:p text:style-name="P16">- При удалении элемента, если length становится значительно меньше capacity, массив может сжиматься</text:p>
      <text:p text:style-name="P16">Функция sys.getsizeof() возвращает размер объекта в байтах, включая накладные расходы интерпретатора.</text:p>
      <text:p text:style-name="P15"/>
      <text:p text:style-name="P15">Ход выполнения работы</text:p>
      <text:p text:style-name="P16"/>
      <text:p text:style-name="P16">Часть 1. Исследование стандартного списка Python</text:p>
      <text:p text:style-name="P16"/>
      <text:p text:style-name="P16">Написан скрипт, который:</text:p>
      <text:p text:style-name="P16">1. Создает переменную и выводит ее значение и адрес в памяти</text:p>
      <text:p text:style-name="P16">2. Использует ctypes.cast() для доступа к объекту по адресу</text:p>
      <text:p text:style-name="P16">3. Динамически добавляет 20 элементов в список, отслеживая изменение размера</text:p>
      <text:p text:style-name="P16">4. Удаляет 20 элементов из списка, отслеживая изменение размера</text:p>
      <text:p text:style-name="P16"/>
      <text:p text:style-name="P16">Результаты исследования:</text:p>
      <text:p text:style-name="P16">- Стандартный список Python имеет начальный размер 56 байт (для пустого списка)</text:p>
      <text:p text:style-name="P16">- При добавлении элементов размер увеличивается не при каждом добавлении, а при достижении порога</text:p>
      <text:p text:style-name="P16">- Стратегия роста: емкость увеличивается примерно в 1.125 раза (на 12.5%)</text:p>
      <text:p text:style-name="P16">- При удалении элементов размер списка не уменьшается (память не освобождается)</text:p>
      <text:p text:style-name="P16"/>
      <text:p text:style-name="P16">Часть 2. Реализация собственного динамического массива</text:p>
      <text:p text:style-name="P16"/>
      <text:p text:style-name="P16">Реализован класс MyList, который:</text:p>
      <text:p text:style-name="P16">- Использует ctypes.py_object для создания массива фиксированного размера</text:p>
      <text:p text:style-name="P16">- Хранит текущую длину (length) и емкость (capacity)</text:p>
      <text:p text:style-name="P16">- Реализует метод append() с автоматическим расширением (capacity * 2)</text:p>
      <text:p text:style-name="P16"><text:soft-page-break/>- Реализует метод pop() с автоматическим сжатием при length &lt;= capacity // 2 + 1</text:p>
      <text:p text:style-name="P16">- Поддерживает операцию len() через метод __len__</text:p>
      <text:p text:style-name="P16">- Поддерживает доступ по индексу через метод __getitem__</text:p>
      <text:p text:style-name="P16">Стратегия расширения: при заполнении массива емкость удваивается. Стратегия сжатия: при удалении элементов, когда длина становится меньше или равна половине емкости плюс один, массив сжимается.</text:p>
      <text:p text:style-name="P16"/>
      <text:p text:style-name="P18">Листинг программы</text:p>
      <text:p text:style-name="P19"/>
      <text:p text:style-name="P20"><text:span text:style-name="T3">Исходный код программы (листинг) размещен в репозитории </text:span><text:span text:style-name="T6">GitHub </text:span></text:p>
      <text:p text:style-name="P21"><text:a xlink:type="simple" xlink:href="https://github.com/warofconnection/BMSTU_Python_UstinovIM" text:style-name="Internet_20_link" text:visited-style-name="Visited_20_Internet_20_Link"><text:span text:style-name="Strong_20_Emphasis"><text:span text:style-name="T7">https://github.com/warofconnection/BMSTU_Python_UstinovIM</text:span></text:span></text:a><text:span text:style-name="Strong_20_Emphasis"><text:span text:style-name="T7"><text:tab/></text:span></text:span></text:p>
      <text:p text:style-name="P16"/>
      <text:p text:style-name="P15">Список использованной литературы и материалов</text:p>
      <text:p text:style-name="P16">1. Иванова Г.С. Основы программирования: учебник для вузов. – 4-е изд., стер. – М: изд-во МГТУ им. Н.Э. Баумана, 2007. – 416 с.: ил.</text:p>
      <text:p text:style-name="P16">2. Лутц М. Изучаем Python. – 5-е изд. – М.: Диалектика, 2019. – 1460 с.: ил.</text:p>
      <text:p text:style-name="P16">3. ctypes — A foreign function library for Python. — Текст : электронный // Python Documentation : [сайт]. — URL: https://docs.python.org/3/library/ctypes.html</text:p>
      <text:p text:style-name="P16">4. sys — System-specific parameters and functions. — Текст : электронный // Python Documentation : [сайт]. — URL: https://docs.python.org/3/library/sys.html</text:p>
      <text:p text:style-name="P16">5. Welcome to python.org. — Текст : электронный // The official home of the Python Programming Language : [сайт]. — URL: https://www.python.org/</text:p>
      <text:p text:style-name="P16">6. Git. — Текст : электронный // Git : [сайт]. — URL: https://git-scm.com/</text:p>
      <text:p text:style-name="P16">7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31210d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13:38.857839356</meta:creation-date>
    <meta:editing-duration>PT30M18S</meta:editing-duration>
    <meta:editing-cycles>12</meta:editing-cycles>
    <meta:generator>LibreOffice/25.8.6.2$Windows_X86_64 LibreOffice_project/b4b39682cd9868fa725bc664aff94278d315bd04</meta:generator>
    <dc:title>my_default</dc:title>
    <dc:date>2026-05-29T20:30:54.090542800</dc:date>
    <meta:document-statistic meta:table-count="3" meta:image-count="1" meta:object-count="0" meta:page-count="6" meta:paragraph-count="76" meta:word-count="612" meta:character-count="4673" meta:non-whitespace-character-count="4115"/>
  </office:meta>
</office:document-meta>
</file>