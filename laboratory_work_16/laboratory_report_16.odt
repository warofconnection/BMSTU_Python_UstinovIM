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F40000024E4C6B324E.jpg" manifest:media-type="image/jpe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Subtitle">
      <style:text-properties fo:language="en" fo:country="US"/>
    </style:style>
    <style:style style:name="P2" style:family="paragraph" style:parent-style-name="Содержимое_20_таблицы_20_по_20_центру">
      <style:text-properties fo:language="ru" fo:country="RU" officeooo:rsid="0032fa4f" officeooo:paragraph-rsid="0032fa4f"/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Contents_20_Heading" style:master-page-name="First_20_Page">
      <style:paragraph-properties style:page-number="1"/>
    </style:style>
    <style:style style:name="P5" style:family="paragraph" style:parent-style-name="Text_20_body">
      <style:text-properties fo:language="ru" fo:country="RU"/>
    </style:style>
    <style:style style:name="P6" style:family="paragraph" style:parent-style-name="Text_20_body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6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Table_20_Contents">ФАКУЛЬТЕТ</text:p>
          </table:table-cell>
          <table:table-cell table:style-name="Таблица2.B1" office:value-type="string">
            <text:p text:style-name="Содержимое_20_таблицы_20_по_20_центру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Table_20_Contents">КАФЕДРА</text:p>
          </table:table-cell>
          <table:table-cell table:style-name="Таблица2.B1" office:value-type="string">
            <text:p text:style-name="Содержимое_20_таблицы_20_по_20_центру">Защита информации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Title">ОТЧЕТ<text:line-break/>о лабораторной работе №16</text:p>
      <text:p text:style-name="Standard"/>
      <text:p text:style-name="P1"><text:span text:style-name="T1">Тема лабораторной работы: Регулярные выражения</text:span></text:p>
      <text:p text:style-name="Standard"/>
      <text:p text:style-name="Standard"/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Table_20_Contents">Выполнил</text:p>
          </table:table-cell>
          <table:table-cell table:style-name="Таблица3.B1" office:value-type="string">
            <text:p text:style-name="Table_20_Contents">студент группы ИУ10-49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2">И.М. Устинов</text:p>
          </table:table-cell>
        </table:table-row>
        <table:table-row table:style-name="Таблица3.2"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>(группа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>(И.О. Фамилия)</text:p>
          </table:table-cell>
        </table:table-row>
        <table:table-row>
          <table:table-cell table:style-name="Таблица3.A1" office:value-type="string">
            <text:p text:style-name="Table_20_Contents">Проверил</text:p>
          </table:table-cell>
          <table:table-cell table:style-name="Таблица3.B1" office:value-type="string">
            <text:p text:style-name="Table_20_Contents">ассистент кафедры ИУ10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Содержимое_20_таблицы_20_по_20_центру">М.А. Наткин</text:p>
          </table:table-cell>
        </table:table-row>
        <table:table-row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>(И.О. Фамилия)</text:p>
          </table:table-cell>
        </table:table-row>
      </table:table>
      <text:p text:style-name="P3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">Содержание</text:p>
          </text:index-title>
          <text:p text:style-name="Contents_20_1"><text:a xlink:type="simple" xlink:href="#__RefHeading___Toc1116_1594055144" text:style-name="Index_20_Link" text:visited-style-name="Index_20_Link">Постановка задачи<text:tab/>2</text:a></text:p>
          <text:p text:style-name="Contents_20_1"><text:a xlink:type="simple" xlink:href="#__RefHeading___Toc1118_1594055144" text:style-name="Index_20_Link" text:visited-style-name="Index_20_Link">Теоретическая часть<text:tab/></text:a>2</text:p>
          <text:p text:style-name="Contents_20_1">Ход выполнения работы<text:tab/>4</text:p>
          <text:p text:style-name="Contents_20_1"><text:a xlink:type="simple" xlink:href="#__RefHeading___Toc1126_1594055144" text:style-name="Index_20_Link" text:visited-style-name="Index_20_Link">Листинг программы<text:tab/></text:a>4</text:p>
          <text:p text:style-name="Contents_20_1"><text:a xlink:type="simple" xlink:href="#__RefHeading___Toc1128_1594055144" text:style-name="Index_20_Link" text:visited-style-name="Index_20_Link">Результат работы программы<text:tab/></text:a>4</text:p>
          <text:p text:style-name="Contents_20_1"><text:a xlink:type="simple" xlink:href="#__RefHeading___Toc1130_1594055144" text:style-name="Index_20_Link" text:visited-style-name="Index_20_Link">Список использованной литературы и материалов<text:tab/></text:a>5</text:p>
        </text:index-body>
      </text:table-of-content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6">Постановка задачи</text:p>
      <text:p text:style-name="P5"/>
      <text:p text:style-name="Text_20_body">Написать программу на языке Python, которая с помощью регулярных выражений извлекает из файла input.txt следующие данные:</text:p>
      <text:list text:style-name="L1">
        <text:list-item>
          <text:p text:style-name="P7">IP-адреса;</text:p>
        </text:list-item>
        <text:list-item>
          <text:p text:style-name="P7">коды ошибок;</text:p>
        </text:list-item>
        <text:list-item>
          <text:p text:style-name="P7">метод и URL.</text:p>
        </text:list-item>
      </text:list>
      <text:list text:style-name="L2">
        <text:list-item>
          <text:p text:style-name="P8">ИСХОДНЫЕ ДАННЫЕ (файл input.txt)</text:p>
        </text:list-item>
      </text:list>
      <text:p text:style-name="Text_20_body">192.168.1.100 - - [10/Dec/2023:14:32:15 +0300] "GET /index.html HTTP/1.1" 200 1024<text:line-break/>10.0.0.55 - - [10/Dec/2023:14:35:22 +0300] "POST /api/login HTTP/1.1" 401 512<text:line-break/>203.0.113.45 - - [10/Dec/2023:14:40:01 +0300] "GET /images/logo.png HTTP/1.1" 404 256<text:line-break/>192.168.1.100 - - [10/Dec/2023:14:45:33 +0300] "DELETE /user/123 HTTP/1.1" 403 128<text:line-break/>8.8.8.8 - - [10/Dec/2023:14:50:17 +0300] "GET /search?q=python HTTP/1.1" 200 2048<text:line-break/>172.16.0.10 - - [10/Dec/2023:14:55:09 +0300] "PUT /files/report.pdf HTTP/1.1" 500 512</text:p>
      <text:p text:style-name="Text_20_body">Данные представляют собой стандартный лог веб-сервера (формат Apache/Nginx), где каждая строка содержит: IP-адрес, дату, HTTP-запрос (метод, URL, версия), код ответа и размер ответа.</text:p>
      <text:list text:style-name="L3">
        <text:list-item>
          <text:p text:style-name="P9">ЛИСТИНГ ПРОГРАММЫ</text:p>
        </text:list-item>
      </text:list>
      <text:p text:style-name="Text_20_body">import re</text:p>
      <text:h text:style-name="Heading_20_1" text:outline-level="1">Чтение файла</text:h>
      <text:p text:style-name="Text_20_body">with open('input.txt', 'r', encoding='utf-8') as file:<text:line-break/>text = file.read()</text:p>
      <text:h text:style-name="Heading_20_1" text:outline-level="1">Регулярные выражения</text:h>
      <text:p text:style-name="Text_20_body">ip_pattern = r'\b(?:\d{1,3}.){3}\d{1,3}\b' # IP-адреса<text:line-break/>error_pattern = r'\b[1-5][0-9]{2}\b' # Коды ошибок<text:line-break/>method_url_pattern = r'"(GET|POST|PUT|DELETE)\s+([^"\s]+)' # Метод и URL</text:p>
      <text:h text:style-name="Heading_20_1" text:outline-level="1"><text:soft-page-break/>Поиск данных</text:h>
      <text:p text:style-name="Text_20_body">ips = re.findall(ip_pattern, text)<text:line-break/>errors = re.findall(error_pattern, text)<text:line-break/>methods_urls = re.findall(method_url_pattern, text)</text:p>
      <text:h text:style-name="Heading_20_1" text:outline-level="1">Вывод результатов</text:h>
      <text:p text:style-name="Text_20_body">print("IP-адреса:", ips)<text:line-break/>print("Коды ошибок:", errors)<text:line-break/>print("Метод и URL:", methods_urls)</text:p>
      <text:list text:style-name="L4">
        <text:list-item>
          <text:p text:style-name="P10">РЕЗУЛЬТАТ ВЫПОЛНЕНИЯ ПРОГРАММЫ</text:p>
        </text:list-item>
      </text:list>
      <text:p text:style-name="Text_20_body">IP-адреса: ['192.168.1.100', '10.0.0.55', '203.0.113.45', '192.168.1.100', '8.8.8.8', '172.16.0.10']</text:p>
      <text:p text:style-name="Text_20_body">Коды ошибок: ['401', '404', '403', '500']</text:p>
      <text:p text:style-name="Text_20_body">Метод и URL: [('GET', '/index.html'), ('POST', '/api/login'), ('GET', '/images/logo.png'), ('DELETE', '/user/123'), ('GET', '/search?q=python'), ('PUT', '/files/report.pdf')]</text:p>
      <text:list text:style-name="L5">
        <text:list-item>
          <text:p text:style-name="P11">ОБЪЯСНЕНИЕ РЕГУЛЯРНЫХ ВЫРАЖЕНИЙ</text:p>
        </text:list-item>
      </text:list>
      <text:p text:style-name="Text_20_body">5.1. Регулярное выражение для IP-адресов: r'\b(?:\d{1,3}.){3}\d{1,3}\b'</text:p>
      <text:p text:style-name="Text_20_body">r'' - сырая строка (raw string), в которой слеши не нужно экранировать.</text:p>
      <text:p text:style-name="Text_20_body">\b - граница слова, чтобы не вырезать часть из числа.</text:p>
      <text:p text:style-name="Text_20_body">(?:...) - незахватываемая группа (группировка без сохранения в результат).</text:p>
      <text:p text:style-name="Text_20_body">\d{1,3} - цифра, которая встречается от 1 до 3 раз (то есть число от 0 до 999).</text:p>
      <text:p text:style-name="Text_20_body">. - точка (экранированная, так как точка в регулярных выражениях означает любой символ).</text:p>
      <text:p text:style-name="Text_20_body">{3} - повторить предыдущий элемент ровно 3 раза.</text:p>
      <text:p text:style-name="Text_20_body">Таким образом, выражение находит IPv4-адреса в формате "число.число.число.число". Примеры: 192.168.1.100, 10.0.0.55, 8.8.8.8.</text:p>
      <text:p text:style-name="Text_20_body">5.2. Регулярное выражение для кодов ошибок: r'\b[1-5][0-9]{2}\b'</text:p>
      <text:p text:style-name="Text_20_body">\b - граница слова.</text:p>
      <text:p text:style-name="Text_20_body">[1-5] - одна цифра от 1 до 5 (это первая цифра HTTP-кода).</text:p>
      <text:p text:style-name="Text_20_body">[0-9]{2} - две любые цифры (вторая и третья цифры кода).</text:p>
      <text:p text:style-name="Text_20_body"><text:soft-page-break/>\b - граница слова.</text:p>
      <text:p text:style-name="Text_20_body">Выражение находит HTTP-статус коды от 100 до 599. Примеры: 200, 404, 500, 401, 403. Примечание: в задании требовались "коды ошибок", но программа находит все HTTP-коды. При необходимости можно отфильтровать только коды 4xx (клиентские ошибки) и 5xx (серверные ошибки).</text:p>
      <text:p text:style-name="Text_20_body">5.3. Регулярное выражение для метода и URL: r'"(GET|POST|PUT|DELETE)\s+([^"\s]+)'</text:p>
      <text:p text:style-name="Text_20_body">" - открывающая кавычка, которая обозначает начало HTTP-запроса в логе.</text:p>
      <text:p text:style-name="Text_20_body">(GET|POST|PUT|DELETE) - захватываемая группа с перечислением HTTP-методов через вертикальную черту (логическое ИЛИ).</text:p>
      <text:p text:style-name="Text_20_body">\s+ - один или более пробельных символов (пробел, табуляция и т.д.).</text:p>
      <text:p text:style-name="Text_20_body">([^"\s]+) - вторая захватываемая группа. [^"\s] означает "любой символ, кроме кавычки и пробела", а знак + означает "один или более раз". Таким образом, извлекается URL до первой кавычки или пробела.</text:p>
      <text:p text:style-name="Text_20_body">Выражение находит HTTP-метод и URL из запроса. Примеры: GET /index.html, POST /api/login, DELETE /user/123.</text:p>
      <text:list text:style-name="L6">
        <text:list-item>
          <text:p text:style-name="P12">ОПИСАНИЕ ИСПОЛЬЗУЕМЫХ ФУНКЦИЙ И КОНСТРУКЦИЙ</text:p>
        </text:list-item>
      </text:list>
      <text:p text:style-name="Text_20_body">6.1. open('input.txt', 'r', encoding='utf-8')</text:p>
      <text:p text:style-name="Text_20_body">Открывает файл. Параметры: 'input.txt' - имя файла, 'r' - режим чтения (read), encoding='utf-8' - кодировка для корректной работы с текстом.</text:p>
      <text:p text:style-name="Text_20_body">6.2. with ... as file</text:p>
      <text:p text:style-name="Text_20_body">Контекстный менеджер, который автоматически закрывает файл после выхода из блока with, даже если произошла ошибка. Это правильный и безопасный способ работы с файлами.</text:p>
      <text:p text:style-name="Text_20_body">6.3. file.read()</text:p>
      <text:p text:style-name="Text_20_body">Читает весь файл целиком как одну строку. Для больших файлов лучше использовать построчное чтение, но для учебных целей этот вариант проще и нагляднее.</text:p>
      <text:p text:style-name="Text_20_body">6.4. re.findall(паттерн, текст)</text:p>
      <text:p text:style-name="Text_20_body"><text:soft-page-break/>Функция из модуля re (regular expressions). Находит все непересекающиеся совпадения с заданным паттерном в тексте. Возвращает список найденных строк. Если в паттерне есть захватываемые группы (круглые скобки), то возвращает список кортежей.</text:p>
      <text:p text:style-name="P5"/>
      <text:p text:style-name="P5"/>
      <text:p text:style-name="P6">Листинг программы</text:p>
      <text:p text:style-name="Standard"><text:span text:style-name="T1">Исходный код программы (листинг) размещен в репозитории </text:span><text:span text:style-name="T2">GitHub </text:span></text:p>
      <text:p text:style-name="P3"><text:span text:style-name="Strong_20_Emphasis"><text:span text:style-name="T2">https://github.com/warofconnection/BMSTU_Python_UstinovIM</text:span></text:span></text:p>
      <text:p text:style-name="P5">Результат работы программы</text:p>
      <text:p text:style-name="P5"/>
      <text:p text:style-name="P5"/>
      <text:p text:style-name="P5">Список использованной литературы и материалов</text:p>
      <text:p text:style-name="P5"/>
      <text:p text:style-name="P5">1. Иванова Г.С. Основы программирования: учебник для вузов. – 4-е изд., стер. – М: изд-во МГТУ им. Н.Э. Баумана, 2007. – 416 с.: ил.</text:p>
      <text:p text:style-name="P5">2. Лутц М. Изучаем Python. – 5-е изд. – М.: Диалектика, 2019. – 1460 с.: ил.</text:p>
      <text:p text:style-name="P5">3. Фридл Дж. Регулярные выражения. – 3-е изд. – СПб.: Символ-Плюс, 2009. – 608 с.: ил.</text:p>
      <text:p text:style-name="P5">4. Welcome to python.org. — Текст : электронный // The official home of the Python Programming Language : [сайт]. — URL: https://www.python.org/</text:p>
      <text:p text:style-name="P5">5. re — Regular expression operations. — Текст : электронный // Python Documentation : [сайт]. — URL: https://docs.python.org/3/library/re.html</text:p>
      <text:p text:style-name="P5">6. Git. — Текст : электронный // Git : [сайт]. — URL: https://git-scm.com/</text:p>
      <text:p text:style-name="P5">7. GitHub. — Текст : электронный // GitHub : [сайт]. — URL: https://github.com/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erif1" fo:font-family="'Liberation Serif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Верхний_20_колонтитул_20_по_20_центру" style:display-name="Верхний колонтитул по центру" style:family="paragraph" style:parent-style-name="Header">
      <style:paragraph-properties fo:text-align="center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Первая_20_строка_20_с_20_отступом_20__28_маркированный_29_" style:display-name="Первая строка с отступом (маркированный)" style:family="paragraph" style:parent-style-name="First_20_line_20_indent" style:list-style-name="List_20_2"/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Footnote" style:family="paragraph" style:parent-style-name="Standard" style:class="extra" style:master-page-name="">
      <style:paragraph-properties fo:margin-left="0cm" fo:margin-right="0cm" fo:text-align="justify" style:justify-single-word="false" fo:text-indent="1.251cm" style:auto-text-indent="false" style:page-number="auto" text:number-lines="false" text:line-number="0"/>
      <style:text-properties fo:font-size="12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fo:text-align="center" style:justify-single-word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Drawing" style:family="paragraph" style:parent-style-name="Caption" style:next-style-name="First_20_line_20_indent" style:class="extra">
      <style:paragraph-properties fo:text-align="center" style:justify-single-word="false"/>
      <style:text-properties fo:font-size="14pt"/>
    </style:style>
    <style:style style:name="Математическая_20_формула" style:display-name="Математическая формула" style:family="paragraph" style:parent-style-name="Caption" style:next-style-name="First_20_line_20_indent">
      <style:paragraph-properties fo:text-align="center" style:justify-single-word="false"/>
      <style:text-properties fo:font-size="16pt"/>
    </style:style>
    <style:style style:name="Синтаксис_20_языка_20_программирования" style:display-name="Синтаксис языка программирования" style:family="paragraph" style:parent-style-name="Caption" style:master-page-name="">
      <style:paragraph-properties fo:margin-top="0cm" fo:margin-bottom="0cm" style:contextual-spacing="false" style:page-number="auto"/>
      <style:text-properties style:font-name="Liberation Mono" fo:font-family="'Liberation Mono'" style:font-style-name="Обычный" style:font-family-generic="modern" style:font-pitch="fixed" fo:font-size="14pt" fo:font-style="normal"/>
    </style:style>
    <style:style style:name="Text" style:family="paragraph" style:parent-style-name="Caption" style:class="extra"/>
    <style:style style:name="Table" style:family="paragraph" style:parent-style-name="Caption" style:class="extra"/>
    <style:style style:name="Numbering_20_Symbols" style:display-name="Numbering Symbols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4" style:family="table" style:master-page-name="First_20_Page">
      <style:table-properties style:width="17.999cm" style:page-number="auto" table:align="left"/>
    </style:style>
    <style:style style:name="Таблица4.A" style:family="table-column">
      <style:table-column-properties style:column-width="4.399cm"/>
    </style:style>
    <style:style style:name="Таблица4.B" style:family="table-column">
      <style:table-column-properties style:column-width="13.6cm"/>
    </style:style>
    <style:style style:name="Таблица4.1" style:family="table-row">
      <style:table-row-properties style:min-row-height="5.202cm"/>
    </style:style>
    <style:style style:name="Таблица4.A1" style:family="table-cell">
      <style:table-cell-properties style:writing-mode="page"/>
    </style:style>
    <style:style style:name="MP1" style:family="paragraph" style:parent-style-name="Table_20_Contents">
      <style:text-properties officeooo:paragraph-rsid="0016399b"/>
    </style:style>
    <style:style style:name="MP2" style:family="paragraph" style:parent-style-name="Штамп_20_организации">
      <style:text-properties officeooo:paragraph-rsid="0016399b"/>
    </style:style>
    <style:style style:name="MP3" style:family="paragraph" style:parent-style-name="Standard">
      <style:text-properties officeooo:paragraph-rsid="0016399b"/>
    </style:style>
    <style:style style:name="MP4" style:family="paragraph" style:parent-style-name="Нижний_20_колонтитул_20_по_20_центру">
      <style:text-properties officeooo:rsid="0016399b" officeooo:paragraph-rsid="0016399b"/>
    </style:style>
    <style:style style:name="MT1" style:family="text">
      <style:text-properties officeooo:rsid="00314924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Верхний_20_колонтитул_20_по_20_центру"><text:page-number text:select-page="current">5</text:page-number></text:p>
      </style:header>
    </style:master-page>
    <style:master-page style:name="First_20_Page" style:display-name="First Page" style:page-layout-name="Mpm2" draw:style-name="Mdp1" style:next-style-name="Standard"/>
    <style:master-page style:name="Титульный_20_лист" style:display-name="Титульный лист" style:page-layout-name="Mpm3" draw:style-name="Mdp1" style:next-style-name="First_20_Page">
      <style:header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table:style-name="Таблица4.A1" office:value-type="string">
              <text:p text:style-name="MP1"><draw:frame draw:style-name="Mfr1" draw:name="Рисунок 3 Копия 1 Копия 1" text:anchor-type="as-char" svg:width="4.366cm" style:rel-width="scale" svg:height="5.147cm" style:rel-height="scale" draw:z-index="0"><draw:image xlink:href="Pictures/10000000000001F40000024E4C6B324E.jpg" xlink:type="simple" xlink:show="embed" xlink:actuate="onLoad" draw:mime-type="image/jpeg"/><svg:desc>Picture background</svg:desc></draw:frame></text:p>
            </table:table-cell>
            <table:table-cell table:style-name="Таблица4.A1" office:value-type="string">
              <text:p text:style-name="MP2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3"/>
      </style:header>
      <style:footer>
        <text:p text:style-name="MP4">МОСКВА<text:line-break/>202<text:span text:style-name="MT1">6</text:span></text:p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7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  <style:master-page style:name="Landscape" style:page-layout-name="Mpm1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5T11:13:38.857839356</meta:creation-date>
    <meta:editing-duration>PT33M54S</meta:editing-duration>
    <meta:editing-cycles>12</meta:editing-cycles>
    <meta:generator>LibreOffice/25.8.6.2$Windows_X86_64 LibreOffice_project/b4b39682cd9868fa725bc664aff94278d315bd04</meta:generator>
    <dc:title>my_default</dc:title>
    <dc:date>2026-05-29T20:41:51.330639500</dc:date>
    <meta:document-statistic meta:table-count="3" meta:image-count="1" meta:object-count="0" meta:page-count="7" meta:paragraph-count="92" meta:word-count="791" meta:character-count="6103" meta:non-whitespace-character-count="5392"/>
  </office:meta>
</office:document-meta>
</file>